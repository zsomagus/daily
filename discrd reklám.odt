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atlakozz <text:span text:style-name="T1">spirituális közösségi tér</text:span> discord szerveremhez: <text:a xlink:type="simple" xlink:href="https://discord.gg/ytF9Qxkc" text:style-name="Internet_20_link" text:visited-style-name="Visited_20_Internet_20_Link">https://discord.gg/ytF9Qxkc</text:a></text:p>
      <text:p text:style-name="Standard">Több csetszoba vár, és egy bot. <text:s/>Amihez több <text:s/>funkciót kötöttem.</text:p>
      <text:p text:style-name="Standard">Álomfejtés funkcióján <text:s/>kívül, ahol létrehozhatsz egy promptot az álom képeedről -amit bemásolva egy képgenerátorba, megszülethet egy kép <text:s/>az álmodból.</text:p>
      <text:p text:style-name="Standard">megnézheted a <text:s/>napi aktuális yantrát, ami segíti a <text:s/>meditációt.</text:p>
      <text:p text:style-name="Standard">És hamarosan Védikus asztrológiai számítások is csatlakoznak a szerverhez.</text:p>
      <text:p text:style-name="Standard"/>
      <text:p text:style-name="Standard">Már csak ti hiányoztok, szellemi, lelki <text:s/>gondolkodású <text:s/>személyek -férfi, nő, gyerrek- csatlakozását várom, főleg, hogy egymással osszátok <text:s/>meg élményeiteket, tudásotokat.</text:p>
      <text:p text:style-name="Standard"/>
      <text:p text:style-name="Standard">Tanuljunk együtt egymástól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1T07:00:49.82</meta:creation-date>
    <meta:editing-duration>PT4M18S</meta:editing-duration>
    <meta:editing-cycles>2</meta:editing-cycles>
    <meta:generator>OpenOffice/4.1.15$Win32 OpenOffice.org_project/4115m2$Build-9813</meta:generator>
    <meta:initial-creator>Mucsi Zsombor</meta:initial-creator>
    <meta:document-statistic meta:table-count="0" meta:image-count="0" meta:object-count="0" meta:page-count="1" meta:paragraph-count="7" meta:word-count="77" meta:character-count="636"/>
    <dc:date>2026-06-11T07:01:50.05</dc:date>
    <dc:creator>Mucsi Zsombor</dc:creator>
  </office:meta>
</office:document-meta>
</file>