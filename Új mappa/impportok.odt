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m modulok import score_renderer</text:p>
      <text:p text:style-name="Standard"/>
      <text:p text:style-name="Standard">from modulok.infografika_pipeline import run_infografika, generate_infografika_svg</text:p>
      <text:p text:style-name="Standard">from modulok.sonic_bridge import compute_full_chart</text:p>
      <text:p text:style-name="Standard">from modulok.sonic_world import generate_full_audio</text:p>
      <text:p text:style-name="Standard">from modulok.varshaphala_infografika import run_varshaphala_infografika</text:p>
      <text:p text:style-name="Standard">from modulok.elemzes_core import generate_full_analysis</text:p>
      <text:p text:style-name="Standard">from modulok.svg_to_png import svg_file_to_png</text:p>
      <text:p text:style-name="Standard">from modulok.zene_infografika_svg import generate_zene_infografika_svg</text:p>
      <text:p text:style-name="Standard">from modulok.sonic_profile_svg import generate_sonic_profile_svg</text:p>
      <text:p text:style-name="Standard">from modulok.audio_analysis_enhanced import analyze_audio_enhanced</text:p>
      <text:p text:style-name="Standard"/>
      <text:p text:style-name="Standard"/>
      <text:p text:style-name="Standard">def on_infografika_button_clicked():</text:p>
      <text:p text:style-name="Standard"><text:s text:c="4"/>if not hasattr(window, "current_chart") or window.current_chart is None:</text:p>
      <text:p text:style-name="Standard"><text:s text:c="8"/>return</text:p>
      <text:p text:style-name="Standard"/>
      <text:p text:style-name="Standard"><text:s text:c="4"/>svg_str = generate_infografika_svg(window.current_chart)</text:p>
      <text:p text:style-name="Standard"><text:s text:c="4"/>svg_path = "output/infografika.svg"</text:p>
      <text:p text:style-name="Standard"><text:s text:c="4"/>png_path = "output/infografika.png"</text:p>
      <text:p text:style-name="Standard"/>
      <text:p text:style-name="Standard"><text:s text:c="4"/>os.makedirs("output", exist_ok=True)</text:p>
      <text:p text:style-name="Standard"><text:s text:c="4"/>with open(svg_path, "w", encoding="utf-8") as f:</text:p>
      <text:p text:style-name="Standard"><text:s text:c="8"/>f.write(svg_str)</text:p>
      <text:p text:style-name="Standard"/>
      <text:p text:style-name="Standard"><text:s text:c="4"/>svg_file_to_png(svg_path, png_path, scale=2.0)</text:p>
      <text:p text:style-name="Standard"/>
      <text:p text:style-name="Standard"/>
      <text:p text:style-name="Standard">def on_varshaphala_infografika():</text:p>
      <text:p text:style-name="Standard"><text:s text:c="4"/>bd = gui_helpers.get_birth_data(...)</text:p>
      <text:p text:style-name="Standard"><text:s text:c="4"/>age = int(ageInput.text() or 0)</text:p>
      <text:p text:style-name="Standard"/>
      <text:p text:style-name="Standard"><text:s text:c="4"/>varsha = compute_varshaphala_chart(</text:p>
      <text:p text:style-name="Standard"><text:s text:c="8"/>birth_dt=birth_dt,</text:p>
      <text:p text:style-name="Standard"><text:s text:c="8"/>age=age,</text:p>
      <text:p text:style-name="Standard"><text:s text:c="8"/>lat=float(bd["lat"]),</text:p>
      <text:p text:style-name="Standard"><text:s text:c="8"/>lon=float(bd["lon"])</text:p>
      <text:p text:style-name="Standard"><text:s text:c="4"/>)</text:p>
      <text:p text:style-name="Standard">on calcuulate vége</text:p>
      <text:p text:style-name="Standard">from modulok.varga_ikozaeder_adapter import get_face_for_varga</text:p>
      <text:p text:style-name="Standard"><text:s text:c="4"/>face = get_face_for_varga(varga_name)</text:p>
      <text:p text:style-name="Standard"><text:s text:c="4"/>if face:</text:p>
      <text:p text:style-name="Standard"><text:s text:c="8"/>jump_to_frame(face)</text:p>
      <text:p text:style-name="Standard"/>
      <text:p text:style-name="Standard">def on_musicalize():</text:p>
      <text:p text:style-name="Standard"><text:s text:c="4"/>bd = gui_helpers.get_birth_data(name1, date1, time1, lat1, lon1, timezoneSelector)</text:p>
      <text:p text:style-name="Standard"><text:s text:c="4"/>varga_label = vargaSelector.currentText()</text:p>
      <text:p text:style-name="Standard"><text:s text:c="4"/>full = compute_full_chart(bd, varga_label)</text:p>
      <text:p text:style-name="Standard"><text:s text:c="4"/>chart = full["d1"]["chart_obj"] <text:s text:c="2"/># JyotishGanit chart</text:p>
      <text:p text:style-name="Standard"><text:s text:c="4"/>wav_path = generate_full_audio(chart, bd)</text:p>
      <text:p text:style-name="Standard"><text:s text:c="4"/>resultArea.append(f"🎵 Hang mentve: {wav_path}")</text:p>
      <text:p text:style-name="Standard"/>
      <text:p text:style-name="Standard"><text:soft-page-break/>def save_audio_and_all_infografika(chart, audio_path, bpm, key):</text:p>
      <text:p text:style-name="Standard"><text:s text:c="4"/># 1) WAV betöltése</text:p>
      <text:p text:style-name="Standard"><text:s text:c="4"/>with open(audio_path, "rb") as f:</text:p>
      <text:p text:style-name="Standard"><text:s text:c="8"/>audio_bytes = f.read()</text:p>
      <text:p text:style-name="Standard"/>
      <text:p text:style-name="Standard"><text:s text:c="4"/># 2) Zene analízis</text:p>
      <text:p text:style-name="Standard"><text:s text:c="4"/>audio_analysis = analyze_audio_enhanced(audio_bytes, bpm, key)</text:p>
      <text:p text:style-name="Standard"/>
      <text:p text:style-name="Standard"><text:s text:c="4"/># 3) Horoszkóp infografika</text:p>
      <text:p text:style-name="Standard"><text:s text:c="4"/>svg_h = generate_infografika_svg(chart)</text:p>
      <text:p text:style-name="Standard"><text:s text:c="4"/>svg_h_path = audio_path.replace(".wav", "_horoszkop.svg")</text:p>
      <text:p text:style-name="Standard"><text:s text:c="4"/>with open(svg_h_path, "w", encoding="utf-8") as f:</text:p>
      <text:p text:style-name="Standard"><text:s text:c="8"/>f.write(svg_h)</text:p>
      <text:p text:style-name="Standard"><text:s text:c="4"/>svg_file_to_png(svg_h_path, svg_h_path.replace(".svg", ".png"), scale=2.0)</text:p>
      <text:p text:style-name="Standard"/>
      <text:p text:style-name="Standard"><text:s text:c="4"/># 4) Zene infografika</text:p>
      <text:p text:style-name="Standard"><text:s text:c="4"/>svg_z = generate_zene_infografika_svg(audio_analysis)</text:p>
      <text:p text:style-name="Standard"><text:s text:c="4"/>svg_z_path = audio_path.replace(".wav", "_zene.svg")</text:p>
      <text:p text:style-name="Standard"><text:s text:c="4"/>with open(svg_z_path, "w", encoding="utf-8") as f:</text:p>
      <text:p text:style-name="Standard"><text:s text:c="8"/>f.write(svg_z)</text:p>
      <text:p text:style-name="Standard"><text:s text:c="4"/>svg_file_to_png(svg_z_path, svg_z_path.replace(".svg", ".png"), scale=2.0)</text:p>
      <text:p text:style-name="Standard"/>
      <text:p text:style-name="Standard"><text:s text:c="4"/># 5) Sonic Profile</text:p>
      <text:p text:style-name="Standard"><text:s text:c="4"/>svg_s = generate_sonic_profile_svg(chart, audio_analysis)</text:p>
      <text:p text:style-name="Standard"><text:s text:c="4"/>svg_s_path = audio_path.replace(".wav", "_sonic_profile.svg")</text:p>
      <text:p text:style-name="Standard"><text:s text:c="4"/>with open(svg_s_path, "w", encoding="utf-8") as f:</text:p>
      <text:p text:style-name="Standard"><text:s text:c="8"/>f.write(svg_s)</text:p>
      <text:p text:style-name="Standard"><text:s text:c="4"/>svg_file_to_png(svg_s_path, svg_s_path.replace(".svg", ".png"), scale=2.0)</text:p>
      <text:p text:style-name="Standard"/>
      <text:p text:style-name="Standard"/>
      <text:p text:style-name="Standard">def save_audio_and_all_infografika(chart, audio_path, bpm, key):</text:p>
      <text:p text:style-name="Standard"><text:s text:c="4"/>...</text:p>
      <text:p text:style-name="Standard"><text:s text:c="4"/># 1) Audio mentése</text:p>
      <text:p text:style-name="Standard"><text:s text:c="4"/>self.save_audio_and_all_infografika(chart, audio_bytes, audio_path, bpm, key)</text:p>
      <text:p text:style-name="Standard"/>
      <text:p text:style-name="Standard"><text:s text:c="4"/># 2) Horoszkóp‑infografika generálása ugyanebben a lépésben</text:p>
      <text:p text:style-name="Standard"><text:s text:c="4"/>svg_str = generate_infografika_svg(chart)</text:p>
      <text:p text:style-name="Standard"><text:s text:c="4"/>svg_path = audio_path.replace(".wav", "_horoszkop.svg")</text:p>
      <text:p text:style-name="Standard"><text:s text:c="4"/>png_path = audio_path.replace(".wav", "_horoszkop.png")</text:p>
      <text:p text:style-name="Standard"/>
      <text:p text:style-name="Standard"><text:s text:c="4"/>with open(svg_path, "w", encoding="utf-8") as f:</text:p>
      <text:p text:style-name="Standard"><text:s text:c="8"/>f.write(svg_str)</text:p>
      <text:p text:style-name="Standard"/>
      <text:p text:style-name="Standard"><text:s text:c="4"/>svg_file_to_png(svg_path, png_path, scale=2.0)</text:p>
      <text:p text:style-name="Standard"/>
      <text:p text:style-name="Standard"/>
      <text:p text:style-name="Standard">def save_audio_and_infografikak(self, chart, audio_bytes, audio_path, audio_analysis):</text:p>
      <text:p text:style-name="Standard"><text:s text:c="4"/># 1) audio</text:p>
      <text:p text:style-name="Standard"><text:s text:c="4"/>with open(audio_path, "wb") as f:</text:p>
      <text:p text:style-name="Standard"><text:s text:c="8"/>f.write(audio_bytes)</text:p>
      <text:p text:style-name="Standard"/>
      <text:p text:style-name="Standard"><text:s text:c="4"/># 2) horoszkóp‑infografika</text:p>
      <text:p text:style-name="Standard"><text:soft-page-break/><text:s text:c="4"/>from modulok.infografika_pipeline import generate_infografika_svg</text:p>
      <text:p text:style-name="Standard"><text:s text:c="4"/>svg_h = generate_infografika_svg(chart)</text:p>
      <text:p text:style-name="Standard"><text:s text:c="4"/>svg_h_path = audio_path.replace(".wav", "_horoszkop.svg")</text:p>
      <text:p text:style-name="Standard"><text:s text:c="4"/>with open(svg_h_path, "w", encoding="utf-8") as f:</text:p>
      <text:p text:style-name="Standard"><text:s text:c="8"/>f.write(svg_h)</text:p>
      <text:p text:style-name="Standard"><text:s text:c="4"/>svg_file_to_png(svg_h_path, svg_h_path.replace(".svg", ".png"), scale=2.0)</text:p>
      <text:p text:style-name="Standard"/>
      <text:p text:style-name="Standard"><text:s text:c="4"/># 3) zene‑infografkika</text:p>
      <text:p text:style-name="Standard"><text:s text:c="4"/>svg_z = generate_zene_infografika_svg(audio_analysis)</text:p>
      <text:p text:style-name="Standard"><text:s text:c="4"/>svg_z_path = audio_path.replace(".wav", "_zene.svg")</text:p>
      <text:p text:style-name="Standard"><text:s text:c="4"/>with open(svg_z_path, "w", encoding="utf-8") as f:</text:p>
      <text:p text:style-name="Standard"><text:s text:c="8"/>f.write(svg_z)</text:p>
      <text:p text:style-name="Standard"><text:s text:c="4"/>svg_file_to_png(svg_z_path, svg_z_path.replace(".svg", ".png"), scale=2.0)</text:p>
      <text:p text:style-name="Standard"/>
      <text:p text:style-name="Standard"/>
      <text:p text:style-name="Standard">on <text:s/>varshapha</text:p>
      <text:p text:style-name="Standard"><text:s text:c="4"/>from modulok.elemzes_core import generate_markdown_summary, summarize_purusharthas, save_analysis_pdf</text:p>
      <text:p text:style-name="Standard"/>
      <text:p text:style-name="Standard">dir /s mentett_adatok.j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csi Zsombor</meta:initial-creator>
    <meta:creation-date>2026-02-17T13:18:47.86</meta:creation-date>
    <dc:date>2026-02-17T19:12:54.16</dc:date>
    <dc:creator>Mucsi Zsombor</dc:creator>
    <meta:editing-duration>PT3H27M50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3" meta:paragraph-count="96" meta:word-count="344" meta:character-count="4391"/>
  </office:meta>
</office:document-meta>
</file>